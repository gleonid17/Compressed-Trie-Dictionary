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61395833333333cm" style:use-optimal-column-width="true"/>
    </style:style>
    <style:style style:name="co2" style:family="table-column">
      <style:table-column-properties fo:break-before="auto" style:column-width="2.8575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3.12208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CompressedTrie</text:p>
          </table:table-cell>
          <table:table-cell office:value-type="string" table:style-name="ce1">
            <text:p>Trie</text:p>
          </table:table-cell>
          <table:table-cell office:value-type="string" table:style-name="ce1">
            <text:p>Title</text:p>
          </table:table-cell>
          <table:table-cell table:style-name="ce1"/>
          <table:table-cell table:style-name="ce1">
            <draw:frame draw:z-index="1" draw:id="id0" draw:style-name="a0" draw:name="Chart 7" svg:x="0in" svg:y="0in" svg:width="6.92708in" svg:height="4.15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/>
          <table:table-cell table:number-columns-spanned="4" table:number-rows-spanned="1" table:style-name="ce2"/>
          <table:covered-table-cell table:number-columns-repeated="3"/>
          <table:table-cell table:number-columns-repeated="3"/>
          <table:table-cell table:style-name="ce1">
            <draw:frame draw:z-index="2" draw:id="id1" draw:style-name="a1" draw:name="Chart 10" svg:x="0.65625in" svg:y="0in" svg:width="7.33333in" svg:height="4.1666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3" draw:id="id2" draw:style-name="a2" draw:name="Chart 11" svg:x="0.65625in" svg:y="0in" svg:width="7.35417in" svg:height="4.145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57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420195" table:style-name="ce1">
            <text:p>1420195</text:p>
          </table:table-cell>
          <table:table-cell office:value-type="float" office:value="11321119" table:style-name="ce1">
            <text:p>11321119</text:p>
          </table:table-cell>
          <table:table-cell office:value-type="string" table:style-name="ce1">
            <text:p>RANDOM LENGTH</text:p>
          </table:table-cell>
          <table:table-cell table:number-columns-repeated="16380" table:style-name="ce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3751291" table:style-name="ce1">
            <text:p>13751291</text:p>
          </table:table-cell>
          <table:table-cell office:value-type="float" office:value="96006671" table:style-name="ce1">
            <text:p>96006671</text:p>
          </table:table-cell>
          <table:table-cell office:value-type="string" table:style-name="ce1">
            <text:p>RANDOM LENGTH</text:p>
          </table:table-cell>
          <table:table-cell table:number-columns-repeated="16380" table:style-name="ce1"/>
        </table:table-row>
        <table:table-row table:style-name="ro1">
          <table:table-cell office:value-type="float" office:value="500000" table:style-name="ce1">
            <text:p>500000</text:p>
          </table:table-cell>
          <table:table-cell office:value-type="float" office:value="66714577" table:style-name="ce1">
            <text:p>66714577</text:p>
          </table:table-cell>
          <table:table-cell office:value-type="float" office:value="422306750" table:style-name="ce1">
            <text:p>422306750</text:p>
          </table:table-cell>
          <table:table-cell office:value-type="string" table:style-name="ce1">
            <text:p>RANDOM LENGTH</text:p>
          </table:table-cell>
          <table:table-cell table:number-columns-repeated="16380" table:style-name="ce1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31600649" table:style-name="ce1">
            <text:p>131600649</text:p>
          </table:table-cell>
          <table:table-cell office:value-type="float" office:value="797493891" table:style-name="ce1">
            <text:p>797493891</text:p>
          </table:table-cell>
          <table:table-cell office:value-type="string" table:style-name="ce1">
            <text:p>RANDOM LENGTH</text:p>
          </table:table-cell>
          <table:table-cell table:number-columns-repeated="16380" table:style-name="ce1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522507" table:style-name="ce1">
            <text:p>522507</text:p>
          </table:table-cell>
          <table:table-cell office:value-type="float" office:value="1220420" table:style-name="ce1">
            <text:p>1220420</text:p>
          </table:table-cell>
          <table:table-cell office:value-type="string" table:style-name="ce1">
            <text:p>LENGTH 3</text:p>
          </table:table-cell>
          <table:table-cell table:number-columns-repeated="16380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944679" table:style-name="ce1">
            <text:p>944679</text:p>
          </table:table-cell>
          <table:table-cell office:value-type="float" office:value="2318223" table:style-name="ce1">
            <text:p>2318223</text:p>
          </table:table-cell>
          <table:table-cell office:value-type="string" table:style-name="ce1">
            <text:p>LENGTH 3</text:p>
          </table:table-cell>
          <table:table-cell table:number-columns-repeated="16380" table:style-name="ce1"/>
        </table:table-row>
        <table:table-row table:style-name="ro1">
          <table:table-cell office:value-type="float" office:value="15000" table:style-name="ce1">
            <text:p>15000</text:p>
          </table:table-cell>
          <table:table-cell office:value-type="float" office:value="1338301" table:style-name="ce1">
            <text:p>1338301</text:p>
          </table:table-cell>
          <table:table-cell office:value-type="float" office:value="3407129" table:style-name="ce1">
            <text:p>3407129</text:p>
          </table:table-cell>
          <table:table-cell office:value-type="string" table:style-name="ce1">
            <text:p>LENGTH 3<text:s/></text:p>
          </table:table-cell>
          <table:table-cell table:number-columns-repeated="16380" table:style-name="ce1"/>
        </table:table-row>
        <table:table-row table:style-name="ro1">
          <table:table-cell office:value-type="float" office:value="17576" table:style-name="ce1">
            <text:p>17576</text:p>
          </table:table-cell>
          <table:table-cell office:value-type="float" office:value="1535417" table:style-name="ce1">
            <text:p>1535417</text:p>
          </table:table-cell>
          <table:table-cell office:value-type="float" office:value="3966555" table:style-name="ce1">
            <text:p>3966555</text:p>
          </table:table-cell>
          <table:table-cell office:value-type="string" table:style-name="ce1">
            <text:p>LENGTH 3</text:p>
          </table:table-cell>
          <table:table-cell table:number-columns-repeated="16380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381175" table:style-name="ce1">
            <text:p>1381175</text:p>
          </table:table-cell>
          <table:table-cell office:value-type="float" office:value="5346241" table:style-name="ce1">
            <text:p>5346241</text:p>
          </table:table-cell>
          <table:table-cell office:value-type="string" table:style-name="ce1">
            <text:p>LENGTH 5</text:p>
          </table:table-cell>
          <table:table-cell table:number-columns-repeated="16380" table:style-name="ce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3451235" table:style-name="ce1">
            <text:p>13451235</text:p>
          </table:table-cell>
          <table:table-cell office:value-type="float" office:value="37652333" table:style-name="ce1">
            <text:p>37652333</text:p>
          </table:table-cell>
          <table:table-cell office:value-type="string" table:style-name="ce1">
            <text:p>LENGTH 5</text:p>
          </table:table-cell>
          <table:table-cell table:number-columns-repeated="16380" table:style-name="ce1"/>
        </table:table-row>
        <table:table-row table:style-name="ro1">
          <table:table-cell office:value-type="float" office:value="500000" table:style-name="ce1">
            <text:p>500000</text:p>
          </table:table-cell>
          <table:table-cell office:value-type="float" office:value="62185143" table:style-name="ce1">
            <text:p>62185143</text:p>
          </table:table-cell>
          <table:table-cell office:value-type="float" office:value="145928389" table:style-name="ce1">
            <text:p>145928389</text:p>
          </table:table-cell>
          <table:table-cell office:value-type="string" table:style-name="ce1">
            <text:p>LENGTH 5</text:p>
          </table:table-cell>
          <table:table-cell table:number-columns-repeated="16380" table:style-name="ce1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15502385" table:style-name="ce1">
            <text:p>115502385</text:p>
          </table:table-cell>
          <table:table-cell office:value-type="float" office:value="267673635" table:style-name="ce1">
            <text:p>267673635</text:p>
          </table:table-cell>
          <table:table-cell office:value-type="string" table:style-name="ce1">
            <text:p>LENGTH 5</text:p>
          </table:table-cell>
          <table:table-cell table:number-columns-repeated="16380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418773" table:style-name="ce1">
            <text:p>1418773</text:p>
          </table:table-cell>
          <table:table-cell office:value-type="float" office:value="9686675" table:style-name="ce1">
            <text:p>9686675</text:p>
          </table:table-cell>
          <table:table-cell office:value-type="string" table:style-name="ce1">
            <text:p>LENGTH 7</text:p>
          </table:table-cell>
          <table:table-cell table:number-columns-repeated="16380" table:style-name="ce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3954925" table:style-name="ce1">
            <text:p>13954925</text:p>
          </table:table-cell>
          <table:table-cell office:value-type="float" office:value="79565666" table:style-name="ce1">
            <text:p>79565666</text:p>
          </table:table-cell>
          <table:table-cell office:value-type="string" table:style-name="ce1">
            <text:p>LENGTH 7</text:p>
          </table:table-cell>
          <table:table-cell table:number-columns-repeated="16380" table:style-name="ce1"/>
        </table:table-row>
        <table:table-row table:style-name="ro1">
          <table:table-cell office:value-type="float" office:value="500000" table:style-name="ce1">
            <text:p>500000</text:p>
          </table:table-cell>
          <table:table-cell office:value-type="float" office:value="68892587" table:style-name="ce1">
            <text:p>68892587</text:p>
          </table:table-cell>
          <table:table-cell office:value-type="float" office:value="337926083" table:style-name="ce1">
            <text:p>337926083</text:p>
          </table:table-cell>
          <table:table-cell office:value-type="string" table:style-name="ce1">
            <text:p>LENGTH 7</text:p>
          </table:table-cell>
          <table:table-cell table:number-columns-repeated="16380" table:style-name="ce1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37390119" table:style-name="ce1">
            <text:p>137390119</text:p>
          </table:table-cell>
          <table:table-cell office:value-type="float" office:value="624863881" table:style-name="ce1">
            <text:p>624863881</text:p>
          </table:table-cell>
          <table:table-cell office:value-type="string" table:style-name="ce1">
            <text:p>LENGTH 7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464161" table:style-name="ce1">
            <text:p>1464161</text:p>
          </table:table-cell>
          <table:table-cell office:value-type="float" office:value="13999333" table:style-name="ce1">
            <text:p>13999333</text:p>
          </table:table-cell>
          <table:table-cell office:value-type="string" table:style-name="ce1">
            <text:p>LENGTH 9</text:p>
          </table:table-cell>
          <table:table-cell table:number-columns-repeated="16380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4307877" table:style-name="ce1">
            <text:p>14307877</text:p>
          </table:table-cell>
          <table:table-cell office:value-type="float" office:value="123021218" table:style-name="ce1">
            <text:p>123021218</text:p>
          </table:table-cell>
          <table:table-cell office:value-type="string" table:style-name="ce1">
            <text:p>LENGTH 9</text:p>
          </table:table-cell>
          <table:table-cell table:number-columns-repeated="16380"/>
        </table:table-row>
        <table:table-row table:style-name="ro1">
          <table:table-cell office:value-type="float" office:value="500000" table:style-name="ce1">
            <text:p>500000</text:p>
          </table:table-cell>
          <table:table-cell office:value-type="float" office:value="70933979" table:style-name="ce1">
            <text:p>70933979</text:p>
          </table:table-cell>
          <table:table-cell office:value-type="float" office:value="554592554" table:style-name="ce1">
            <text:p>554592554</text:p>
          </table:table-cell>
          <table:table-cell office:value-type="string" table:style-name="ce1">
            <text:p>LENGTH 9</text:p>
          </table:table-cell>
          <table:table-cell table:number-columns-repeated="16380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41554681" table:style-name="ce1">
            <text:p>141554681</text:p>
          </table:table-cell>
          <table:table-cell office:value-type="float" office:value="1057453598" table:style-name="ce1">
            <text:p>1057453598</text:p>
          </table:table-cell>
          <table:table-cell office:value-type="string" table:style-name="ce1">
            <text:p>LENGTH 9</text:p>
          </table:table-cell>
          <table:table-cell table:style-name="ce1">
            <draw:frame draw:z-index="4" draw:id="id3" draw:style-name="a3" draw:name="Chart 12" svg:x="0.86458in" svg:y="0.19792in" svg:width="6.92708in" svg:height="4.1562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9"/>
          <table:table-cell table:style-name="ce1">
            <draw:frame draw:z-index="5" draw:id="id4" draw:style-name="a4" draw:name="Chart 5" svg:x="0.65625in" svg:y="0.1875in" svg:width="7.33333in" svg:height="4.1770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493757" table:style-name="ce1">
            <text:p>1493757</text:p>
          </table:table-cell>
          <table:table-cell office:value-type="float" office:value="18344107" table:style-name="ce1">
            <text:p>18344107</text:p>
          </table:table-cell>
          <table:table-cell office:value-type="string" table:style-name="ce1">
            <text:p>LENGTH 11</text:p>
          </table:table-cell>
          <table:table-cell table:number-columns-repeated="23"/>
          <table:table-cell table:style-name="ce1">
            <draw:frame draw:z-index="6" draw:id="id5" draw:style-name="a5" draw:name="Chart 10" svg:x="0in" svg:y="0in" svg:width="7.33333in" svg:height="4.1666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56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4770651" table:style-name="ce1">
            <text:p>14770651</text:p>
          </table:table-cell>
          <table:table-cell office:value-type="float" office:value="166327257" table:style-name="ce1">
            <text:p>166327257</text:p>
          </table:table-cell>
          <table:table-cell office:value-type="string" table:style-name="ce1">
            <text:p>LENGTH 11</text:p>
          </table:table-cell>
          <table:table-cell table:number-columns-repeated="16380"/>
        </table:table-row>
        <table:table-row table:style-name="ro1">
          <table:table-cell office:value-type="float" office:value="500000" table:style-name="ce1">
            <text:p>500000</text:p>
          </table:table-cell>
          <table:table-cell office:value-type="float" office:value="72956509" table:style-name="ce1">
            <text:p>72956509</text:p>
          </table:table-cell>
          <table:table-cell office:value-type="float" office:value="771637473" table:style-name="ce1">
            <text:p>771637473</text:p>
          </table:table-cell>
          <table:table-cell office:value-type="string" table:style-name="ce1">
            <text:p>LENGTH 11</text:p>
          </table:table-cell>
          <table:table-cell table:number-columns-repeated="16380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45435759" table:style-name="ce1">
            <text:p>145435759</text:p>
          </table:table-cell>
          <table:table-cell office:value-type="float" office:value="1491684703" table:style-name="ce1">
            <text:p>1491684703</text:p>
          </table:table-cell>
          <table:table-cell office:value-type="string" table:style-name="ce1">
            <text:p>LENGTH 11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557487" table:style-name="ce1">
            <text:p>1557487</text:p>
          </table:table-cell>
          <table:table-cell office:value-type="float" office:value="24848031" table:style-name="ce1">
            <text:p>24848031</text:p>
          </table:table-cell>
          <table:table-cell office:value-type="string" table:style-name="ce1">
            <text:p>LENGTH 14</text:p>
          </table:table-cell>
          <table:table-cell table:number-columns-repeated="16380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5349203" table:style-name="ce1">
            <text:p>15349203</text:p>
          </table:table-cell>
          <table:table-cell office:value-type="float" office:value="231482375" table:style-name="ce1">
            <text:p>231482375</text:p>
          </table:table-cell>
          <table:table-cell office:value-type="string" table:style-name="ce1">
            <text:p>LENGTH 14</text:p>
          </table:table-cell>
          <table:table-cell table:number-columns-repeated="16380"/>
        </table:table-row>
        <table:table-row table:style-name="ro1">
          <table:table-cell office:value-type="float" office:value="500000" table:style-name="ce1">
            <text:p>500000</text:p>
          </table:table-cell>
          <table:table-cell office:value-type="float" office:value="75954837" table:style-name="ce1">
            <text:p>75954837</text:p>
          </table:table-cell>
          <table:table-cell office:value-type="float" office:value="1097008358" table:style-name="ce1">
            <text:p>1097008358</text:p>
          </table:table-cell>
          <table:table-cell office:value-type="string" table:style-name="ce1">
            <text:p>LENGTH 14</text:p>
          </table:table-cell>
          <table:table-cell table:number-columns-repeated="16380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51424007" table:style-name="ce1">
            <text:p>151424007</text:p>
          </table:table-cell>
          <table:table-cell office:value-type="float" office:value="2142700110" table:style-name="ce1">
            <text:p>2142700110</text:p>
          </table:table-cell>
          <table:table-cell office:value-type="string" table:style-name="ce1">
            <text:p>LENGTH 14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636025" table:style-name="ce1">
            <text:p>1636025</text:p>
          </table:table-cell>
          <table:table-cell office:value-type="float" office:value="33526295" table:style-name="ce1">
            <text:p>33526295</text:p>
          </table:table-cell>
          <table:table-cell office:value-type="string" table:style-name="ce1">
            <text:p>LENGTH 18</text:p>
          </table:table-cell>
          <table:table-cell table:number-columns-repeated="16380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6160659" table:style-name="ce1">
            <text:p>16160659</text:p>
          </table:table-cell>
          <table:table-cell office:value-type="float" office:value="318200349" table:style-name="ce1">
            <text:p>318200349</text:p>
          </table:table-cell>
          <table:table-cell office:value-type="string" table:style-name="ce1">
            <text:p>LENGTH 18</text:p>
          </table:table-cell>
          <table:table-cell table:number-columns-repeated="16380"/>
        </table:table-row>
        <table:table-row table:style-name="ro1">
          <table:table-cell office:value-type="float" office:value="500000" table:style-name="ce1">
            <text:p>500000</text:p>
          </table:table-cell>
          <table:table-cell office:value-type="float" office:value="79941643" table:style-name="ce1">
            <text:p>79941643</text:p>
          </table:table-cell>
          <table:table-cell office:value-type="float" office:value="1531175448" table:style-name="ce1">
            <text:p>1531175448</text:p>
          </table:table-cell>
          <table:table-cell office:value-type="string" table:style-name="ce1">
            <text:p>LENGTH 18</text:p>
          </table:table-cell>
          <table:table-cell table:number-columns-repeated="16380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59461413" table:style-name="ce1">
            <text:p>159461413</text:p>
          </table:table-cell>
          <table:table-cell office:value-type="float" office:value="3010716385" table:style-name="ce1">
            <text:p>3010716385</text:p>
          </table:table-cell>
          <table:table-cell office:value-type="string" table:style-name="ce1">
            <text:p>LENGTH 18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754809" table:style-name="ce1">
            <text:p>1754809</text:p>
          </table:table-cell>
          <table:table-cell office:value-type="float" office:value="46549767" table:style-name="ce1">
            <text:p>46549767</text:p>
          </table:table-cell>
          <table:table-cell office:value-type="string" table:style-name="ce1">
            <text:p>LENGTH 24</text:p>
          </table:table-cell>
          <table:table-cell table:number-columns-repeated="16380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7334091" table:style-name="ce1">
            <text:p>17334091</text:p>
          </table:table-cell>
          <table:table-cell office:value-type="float" office:value="448429644" table:style-name="ce1">
            <text:p>448429644</text:p>
          </table:table-cell>
          <table:table-cell office:value-type="string" table:style-name="ce1">
            <text:p>LENGTH 24</text:p>
          </table:table-cell>
          <table:table-cell table:number-columns-repeated="16380"/>
        </table:table-row>
        <table:table-row table:style-name="ro1">
          <table:table-cell office:value-type="float" office:value="500000" table:style-name="ce1">
            <text:p>500000</text:p>
          </table:table-cell>
          <table:table-cell office:value-type="float" office:value="85903035" table:style-name="ce1">
            <text:p>85903035</text:p>
          </table:table-cell>
          <table:table-cell office:value-type="float" office:value="2182115339" table:style-name="ce1">
            <text:p>2182115339</text:p>
          </table:table-cell>
          <table:table-cell office:value-type="string" table:style-name="ce1">
            <text:p>LENGTH 24</text:p>
          </table:table-cell>
          <table:table-cell table:number-columns-repeated="16380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71416615" table:style-name="ce1">
            <text:p>171416615</text:p>
          </table:table-cell>
          <table:table-cell office:value-type="float" office:value="4312673853" table:style-name="ce1">
            <text:p>4312673853</text:p>
          </table:table-cell>
          <table:table-cell office:value-type="string" table:style-name="ce1">
            <text:p>LENGTH 24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836363" table:style-name="ce1">
            <text:p>1836363</text:p>
          </table:table-cell>
          <table:table-cell office:value-type="float" office:value="55258628" table:style-name="ce1">
            <text:p>55258628</text:p>
          </table:table-cell>
          <table:table-cell office:value-type="string" table:style-name="ce1">
            <text:p>LENGTH 28</text:p>
          </table:table-cell>
          <table:table-cell table:number-columns-repeated="16380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8140287" table:style-name="ce1">
            <text:p>18140287</text:p>
          </table:table-cell>
          <table:table-cell office:value-type="float" office:value="535250910" table:style-name="ce1">
            <text:p>535250910</text:p>
          </table:table-cell>
          <table:table-cell office:value-type="string" table:style-name="ce1">
            <text:p>LENGTH 28</text:p>
          </table:table-cell>
          <table:table-cell table:number-columns-repeated="16380"/>
        </table:table-row>
        <table:table-row table:style-name="ro1">
          <table:table-cell office:value-type="float" office:value="500000" table:style-name="ce1">
            <text:p>500000</text:p>
          </table:table-cell>
          <table:table-cell office:value-type="float" office:value="89914167" table:style-name="ce1">
            <text:p>89914167</text:p>
          </table:table-cell>
          <table:table-cell office:value-type="float" office:value="2616179788" table:style-name="ce1">
            <text:p>2616179788</text:p>
          </table:table-cell>
          <table:table-cell office:value-type="string" table:style-name="ce1">
            <text:p>LENGTH 28</text:p>
          </table:table-cell>
          <table:table-cell table:number-columns-repeated="16380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79461483" table:style-name="ce1">
            <text:p>179461483</text:p>
          </table:table-cell>
          <table:table-cell office:value-type="float" office:value="5180612225" table:style-name="ce1">
            <text:p>5180612225</text:p>
          </table:table-cell>
          <table:table-cell office:value-type="string" table:style-name="ce1">
            <text:p>LENGTH 28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922269" table:style-name="ce1">
            <text:p>1922269</text:p>
          </table:table-cell>
          <table:table-cell office:value-type="float" office:value="63894577" table:style-name="ce1">
            <text:p>63894577</text:p>
          </table:table-cell>
          <table:table-cell office:value-type="string" table:style-name="ce1">
            <text:p>LENGTH 32</text:p>
          </table:table-cell>
          <table:table-cell table:number-columns-repeated="22"/>
          <table:table-cell table:style-name="ce1">
            <draw:frame draw:z-index="9" draw:id="id8" draw:style-name="a8" draw:name="Chart 13" svg:x="0.65625in" svg:y="0.19792in" svg:width="7.3125in" svg:height="4.16667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57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8957959" table:style-name="ce1">
            <text:p>18957959</text:p>
          </table:table-cell>
          <table:table-cell office:value-type="float" office:value="622079771" table:style-name="ce1">
            <text:p>622079771</text:p>
          </table:table-cell>
          <table:table-cell office:value-type="string" table:style-name="ce1">
            <text:p>LENGTH 32</text:p>
          </table:table-cell>
          <table:table-cell/>
          <table:table-cell table:style-name="ce1">
            <draw:frame draw:z-index="7" draw:id="id6" draw:style-name="a6" draw:name="Chart 11" svg:x="0.01042in" svg:y="0.01042in" svg:width="6.91667in" svg:height="4.1458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9"/>
          <table:table-cell table:style-name="ce1">
            <draw:frame draw:z-index="8" draw:id="id7" draw:style-name="a7" draw:name="Chart 12" svg:x="0.01042in" svg:y="0.01042in" svg:width="7.30208in" svg:height="4.1666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float" office:value="500000" table:style-name="ce1">
            <text:p>500000</text:p>
          </table:table-cell>
          <table:table-cell office:value-type="float" office:value="93915489" table:style-name="ce1">
            <text:p>93915489</text:p>
          </table:table-cell>
          <table:table-cell office:value-type="float" office:value="3050241199" table:style-name="ce1">
            <text:p>3050241199</text:p>
          </table:table-cell>
          <table:table-cell office:value-type="string" table:style-name="ce1">
            <text:p>LENGTH 32</text:p>
          </table:table-cell>
          <table:table-cell table:number-columns-repeated="16380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87456247" table:style-name="ce1">
            <text:p>187456247</text:p>
          </table:table-cell>
          <table:table-cell office:value-type="float" office:value="6048897797" table:style-name="ce1">
            <text:p>6048897797</text:p>
          </table:table-cell>
          <table:table-cell office:value-type="string" table:style-name="ce1">
            <text:p>LENGTH 32</text:p>
          </table:table-cell>
          <table:table-cell table:number-columns-repeated="16380"/>
        </table:table-row>
        <table:table-row table:number-rows-repeated="18"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1">
            <draw:frame draw:z-index="10" draw:id="id9" draw:style-name="a9" draw:name="Chart 14" svg:x="0in" svg:y="0.01042in" svg:width="6.91667in" svg:height="4.16667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9"/>
          <table:table-cell table:style-name="ce1">
            <draw:frame draw:z-index="11" draw:id="id10" draw:style-name="a10" draw:name="Chart 15" svg:x="0.01042in" svg:y="0in" svg:width="7.3125in" svg:height="4.13542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104851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dc:title/>
    <dc:description/>
    <dc:subject/>
    <meta:initial-creator>nikolas pomiloridis</meta:initial-creator>
    <dc:creator>Giorgos Leonidou</dc:creator>
    <meta:creation-date>2025-12-04T18:45:13Z</meta:creation-date>
    <dc:date>2025-12-05T02:12:2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2aa0a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3008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9.25pt" svg:width="498.74968503937pt" chart:style-name="Crt0">
        <chart:title chart:style-name="CT00">
          <text:p text:style-name="a0" text:class-names="" text:cond-style-name="">Words with Random Length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ize in byt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of Trie</text:p>
            </chart:title>
            <chart:categories table:cell-range-address="Sheet1.$A$2:.$A$5"/>
          </chart:axis>
          <chart:series chart:label-cell-address="Sheet1.$C$1" chart:values-cell-range-address="Sheet1.$C$2:.$C$5" chart:class="chart:line" chart:attached-axis="primary-y" chart:style-name="G0S0">
            <chart:data-point chart:repeated="4"/>
          </chart:series>
          <chart:series chart:label-cell-address="Sheet1.$B$1" chart:values-cell-range-address="Sheet1.$B$2:.$B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3008c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2aa0a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00.0002362204725pt" svg:width="498.0002362204725pt" chart:style-name="Crt0">
        <chart:title chart:style-name="CT00">
          <text:p text:style-name="a0" text:class-names="" text:cond-style-name="">Words with Length 28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ize in kilobyt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of Trie</text:p>
            </chart:title>
            <chart:categories table:cell-range-address="Sheet1.$A$38:.$A$41"/>
          </chart:axis>
          <chart:series chart:values-cell-range-address="Sheet1.$B$38:.$B$41" chart:class="chart:line" chart:attached-axis="primary-y" chart:style-name="G0S0">
            <chart:data-point chart:repeated="4"/>
          </chart:series>
          <chart:series chart:values-cell-range-address="Sheet1.$C$38:.$C$41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3008c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2aa0a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7.7502362204725pt" svg:width="526.5pt" chart:style-name="Crt0">
        <chart:title chart:style-name="CT00">
          <text:p text:style-name="a0" text:class-names="" text:cond-style-name="">Words with Length 32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ize in kilobyt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of Trie</text:p>
            </chart:title>
            <chart:categories table:cell-range-address="Sheet1.$A$42:.$A$45"/>
          </chart:axis>
          <chart:series chart:values-cell-range-address="Sheet1.$B$42:.$B$45" chart:class="chart:line" chart:attached-axis="primary-y" chart:style-name="G0S0">
            <chart:data-point chart:repeated="4"/>
          </chart:series>
          <chart:series chart:values-cell-range-address="Sheet1.$C$42:.$C$4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3008c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2aa0a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00.0002362204725pt" svg:width="527.99968503937pt" chart:style-name="Crt0">
        <chart:title chart:style-name="CT00">
          <text:p text:style-name="a0" text:class-names="" text:cond-style-name="">Words with Length 3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ize in byt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of Trie</text:p>
            </chart:title>
            <chart:categories table:cell-range-address="Sheet1.$A$6:.$A$9"/>
          </chart:axis>
          <chart:series chart:values-cell-range-address="Sheet1.$B$6:.$B$9" chart:class="chart:line" chart:attached-axis="primary-y" chart:style-name="G0S0">
            <chart:data-point chart:repeated="4"/>
          </chart:series>
          <chart:series chart:values-cell-range-address="Sheet1.$C$6:.$C$9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3008c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2aa0a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8.4996850393701pt" svg:width="529.5002362204724pt" chart:style-name="Crt0">
        <chart:title chart:style-name="CT00">
          <text:p text:style-name="a0" text:class-names="" text:cond-style-name="">Words with Length 5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ize in byt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of Trie</text:p>
            </chart:title>
            <chart:categories table:cell-range-address="Sheet1.$A$10:.$A$13"/>
          </chart:axis>
          <chart:series chart:values-cell-range-address="Sheet1.$B$10:.$B$13" chart:class="chart:line" chart:attached-axis="primary-y" chart:style-name="G0S0">
            <chart:data-point chart:repeated="4"/>
          </chart:series>
          <chart:series chart:values-cell-range-address="Sheet1.$C$10:.$C$13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3008c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2aa0a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9.25pt" svg:width="498.74968503937pt" chart:style-name="Crt0">
        <chart:title chart:style-name="CT00">
          <text:p text:style-name="a0" text:class-names="" text:cond-style-name="">Words with Length 7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ize in byt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of Trie</text:p>
            </chart:title>
            <chart:categories table:cell-range-address="Sheet1.$A$14:.$A$17"/>
          </chart:axis>
          <chart:series chart:values-cell-range-address="Sheet1.$B$14:.$B$17" chart:class="chart:line" chart:attached-axis="primary-y" chart:style-name="G0S0">
            <chart:data-point chart:repeated="4"/>
          </chart:series>
          <chart:series chart:values-cell-range-address="Sheet1.$C$14:.$C$17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3008c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2aa0a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00.74968503937pt" svg:width="527.99968503937pt" chart:style-name="Crt0">
        <chart:title chart:style-name="CT00">
          <text:p text:style-name="a0" text:class-names="" text:cond-style-name="">Words with Length 9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ize in kilobyt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of Trie</text:p>
            </chart:title>
            <chart:categories table:cell-range-address="Sheet1.$A$18:.$A$21"/>
          </chart:axis>
          <chart:series chart:values-cell-range-address="Sheet1.$B$18:.$B$21" chart:class="chart:line" chart:attached-axis="primary-y" chart:style-name="G0S0">
            <chart:data-point chart:repeated="4"/>
          </chart:series>
          <chart:series chart:values-cell-range-address="Sheet1.$C$18:.$C$21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3008c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2aa0a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00.0002362204725pt" svg:width="527.99968503937pt" chart:style-name="Crt0">
        <chart:title chart:style-name="CT00">
          <text:p text:style-name="a0" text:class-names="" text:cond-style-name="">Words with Length 11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ize in kilobyt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of Trie</text:p>
            </chart:title>
            <chart:categories table:cell-range-address="Sheet1.$A$22:.$A$25"/>
          </chart:axis>
          <chart:series chart:values-cell-range-address="Sheet1.$B$22:.$B$25" chart:class="chart:line" chart:attached-axis="primary-y" chart:style-name="G0S0">
            <chart:data-point chart:repeated="4"/>
          </chart:series>
          <chart:series chart:values-cell-range-address="Sheet1.$C$22:.$C$2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3008c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2aa0a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8.4996850393701pt" svg:width="498.0002362204725pt" chart:style-name="Crt0">
        <chart:title chart:style-name="CT00">
          <text:p text:style-name="a0" text:class-names="" text:cond-style-name="">Words with Length 14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ize in kilobyt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of Trie</text:p>
            </chart:title>
            <chart:categories table:cell-range-address="Sheet1.$A$26:.$A$29"/>
          </chart:axis>
          <chart:series chart:values-cell-range-address="Sheet1.$B$26:.$B$29" chart:class="chart:line" chart:attached-axis="primary-y" chart:style-name="G0S0">
            <chart:data-point chart:repeated="4"/>
          </chart:series>
          <chart:series chart:values-cell-range-address="Sheet1.$C$26:.$C$29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3008c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2aa0a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00.0002362204725pt" svg:width="525.74968503937pt" chart:style-name="Crt0">
        <chart:title chart:style-name="CT00">
          <text:p text:style-name="a0" text:class-names="" text:cond-style-name="">Words with Length 18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ize in kilobyt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of Trie</text:p>
            </chart:title>
            <chart:categories table:cell-range-address="Sheet1.$A$30:.$A$33"/>
          </chart:axis>
          <chart:series chart:values-cell-range-address="Sheet1.$B$30:.$B$33" chart:class="chart:line" chart:attached-axis="primary-y" chart:style-name="G0S0">
            <chart:data-point chart:repeated="4"/>
          </chart:series>
          <chart:series chart:values-cell-range-address="Sheet1.$C$30:.$C$33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3008c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2aa0a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00.0002362204725pt" svg:width="526.5pt" chart:style-name="Crt0">
        <chart:title chart:style-name="CT00">
          <text:p text:style-name="a0" text:class-names="" text:cond-style-name="">Words with length 24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ize in kilobyt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of Trie</text:p>
            </chart:title>
            <chart:categories table:cell-range-address="Sheet1.$A$34:.$A$37"/>
          </chart:axis>
          <chart:series chart:values-cell-range-address="Sheet1.$B$34:.$B$37" chart:class="chart:line" chart:attached-axis="primary-y" chart:style-name="G0S0">
            <chart:data-point chart:repeated="4"/>
          </chart:series>
          <chart:series chart:values-cell-range-address="Sheet1.$C$34:.$C$37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