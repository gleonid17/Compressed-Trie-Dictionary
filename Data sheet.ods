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0566666666667cm" style:use-optimal-column-width="true"/>
    </style:style>
    <style:style style:name="co2" style:family="table-column">
      <style:table-column-properties fo:break-before="auto" style:column-width="1.524cm" style:use-optimal-column-width="true"/>
    </style:style>
    <style:style style:name="co3" style:family="table-column">
      <style:table-column-properties fo:break-before="auto" style:column-width="2.7305cm" style:use-optimal-column-width="true"/>
    </style:style>
    <style:style style:name="co4" style:family="table-column">
      <style:table-column-properties fo:break-before="auto" style:column-width="2.095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CompressedTrie</text:p>
          </table:table-cell>
          <table:table-cell office:value-type="string" table:style-name="ce1">
            <text:p>Tri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DOM LENGTH</text:p>
          </table:table-cell>
          <table:table-cell office:value-type="float" office:value="10000" table:style-name="ce1">
            <text:p>10000</text:p>
          </table:table-cell>
          <table:table-cell office:value-type="float" office:value="1420195" table:style-name="ce1">
            <text:p>1420195</text:p>
          </table:table-cell>
          <table:table-cell office:value-type="float" office:value="11321119" table:style-name="ce1">
            <text:p>113211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DOM LENGTH</text:p>
          </table:table-cell>
          <table:table-cell office:value-type="float" office:value="100000" table:style-name="ce1">
            <text:p>100000</text:p>
          </table:table-cell>
          <table:table-cell office:value-type="float" office:value="13751291" table:style-name="ce1">
            <text:p>13751291</text:p>
          </table:table-cell>
          <table:table-cell office:value-type="float" office:value="96006671" table:style-name="ce1">
            <text:p>960066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DOM LENGTH</text:p>
          </table:table-cell>
          <table:table-cell office:value-type="float" office:value="500000" table:style-name="ce1">
            <text:p>500000</text:p>
          </table:table-cell>
          <table:table-cell office:value-type="float" office:value="66714577" table:style-name="ce1">
            <text:p>66714577</text:p>
          </table:table-cell>
          <table:table-cell office:value-type="float" office:value="422306750" table:style-name="ce1">
            <text:p>4223067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DOM LENGTH</text:p>
          </table:table-cell>
          <table:table-cell office:value-type="float" office:value="1000000" table:style-name="ce1">
            <text:p>1000000</text:p>
          </table:table-cell>
          <table:table-cell office:value-type="float" office:value="131600649" table:style-name="ce1">
            <text:p>131600649</text:p>
          </table:table-cell>
          <table:table-cell office:value-type="float" office:value="797493891" table:style-name="ce1">
            <text:p>7974938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3</text:p>
          </table:table-cell>
          <table:table-cell office:value-type="float" office:value="10000" table:style-name="ce1">
            <text:p>10000</text:p>
          </table:table-cell>
          <table:table-cell office:value-type="float" office:value="944679" table:style-name="ce1">
            <text:p>944679</text:p>
          </table:table-cell>
          <table:table-cell office:value-type="float" office:value="2318223" table:style-name="ce1">
            <text:p>23182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5</text:p>
          </table:table-cell>
          <table:table-cell office:value-type="float" office:value="10000" table:style-name="ce1">
            <text:p>10000</text:p>
          </table:table-cell>
          <table:table-cell office:value-type="float" office:value="1381175" table:style-name="ce1">
            <text:p>1381175</text:p>
          </table:table-cell>
          <table:table-cell office:value-type="float" office:value="5346241" table:style-name="ce1">
            <text:p>5346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5</text:p>
          </table:table-cell>
          <table:table-cell office:value-type="float" office:value="100000" table:style-name="ce1">
            <text:p>100000</text:p>
          </table:table-cell>
          <table:table-cell office:value-type="float" office:value="13451235" table:style-name="ce1">
            <text:p>13451235</text:p>
          </table:table-cell>
          <table:table-cell office:value-type="float" office:value="37652333" table:style-name="ce1">
            <text:p>376523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5</text:p>
          </table:table-cell>
          <table:table-cell office:value-type="float" office:value="500000" table:style-name="ce1">
            <text:p>500000</text:p>
          </table:table-cell>
          <table:table-cell office:value-type="float" office:value="62185143" table:style-name="ce1">
            <text:p>62185143</text:p>
          </table:table-cell>
          <table:table-cell office:value-type="float" office:value="145928389" table:style-name="ce1">
            <text:p>1459283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5</text:p>
          </table:table-cell>
          <table:table-cell office:value-type="float" office:value="1000000" table:style-name="ce1">
            <text:p>1000000</text:p>
          </table:table-cell>
          <table:table-cell office:value-type="float" office:value="115502385" table:style-name="ce1">
            <text:p>115502385</text:p>
          </table:table-cell>
          <table:table-cell office:value-type="float" office:value="267673635" table:style-name="ce1">
            <text:p>2676736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7</text:p>
          </table:table-cell>
          <table:table-cell office:value-type="float" office:value="10000" table:style-name="ce1">
            <text:p>10000</text:p>
          </table:table-cell>
          <table:table-cell office:value-type="float" office:value="1418773" table:style-name="ce1">
            <text:p>1418773</text:p>
          </table:table-cell>
          <table:table-cell office:value-type="float" office:value="9686675" table:style-name="ce1">
            <text:p>96866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7</text:p>
          </table:table-cell>
          <table:table-cell office:value-type="float" office:value="100000" table:style-name="ce1">
            <text:p>100000</text:p>
          </table:table-cell>
          <table:table-cell office:value-type="float" office:value="13954925" table:style-name="ce1">
            <text:p>13954925</text:p>
          </table:table-cell>
          <table:table-cell office:value-type="float" office:value="79565666" table:style-name="ce1">
            <text:p>795656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7</text:p>
          </table:table-cell>
          <table:table-cell office:value-type="float" office:value="500000" table:style-name="ce1">
            <text:p>500000</text:p>
          </table:table-cell>
          <table:table-cell office:value-type="float" office:value="68892587" table:style-name="ce1">
            <text:p>68892587</text:p>
          </table:table-cell>
          <table:table-cell office:value-type="float" office:value="337926083" table:style-name="ce1">
            <text:p>3379260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7</text:p>
          </table:table-cell>
          <table:table-cell office:value-type="float" office:value="1000000" table:style-name="ce1">
            <text:p>1000000</text:p>
          </table:table-cell>
          <table:table-cell office:value-type="float" office:value="137390119" table:style-name="ce1">
            <text:p>137390119</text:p>
          </table:table-cell>
          <table:table-cell office:value-type="float" office:value="624863881" table:style-name="ce1">
            <text:p>6248638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9</text:p>
          </table:table-cell>
          <table:table-cell office:value-type="float" office:value="10000" table:style-name="ce1">
            <text:p>10000</text:p>
          </table:table-cell>
          <table:table-cell office:value-type="float" office:value="1464161" table:style-name="ce1">
            <text:p>1464161</text:p>
          </table:table-cell>
          <table:table-cell office:value-type="float" office:value="13999333" table:style-name="ce1">
            <text:p>139993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9</text:p>
          </table:table-cell>
          <table:table-cell office:value-type="float" office:value="100000" table:style-name="ce1">
            <text:p>100000</text:p>
          </table:table-cell>
          <table:table-cell office:value-type="float" office:value="14307877" table:style-name="ce1">
            <text:p>14307877</text:p>
          </table:table-cell>
          <table:table-cell office:value-type="float" office:value="123021218" table:style-name="ce1">
            <text:p>1230212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9</text:p>
          </table:table-cell>
          <table:table-cell office:value-type="float" office:value="500000" table:style-name="ce1">
            <text:p>500000</text:p>
          </table:table-cell>
          <table:table-cell office:value-type="float" office:value="70933979" table:style-name="ce1">
            <text:p>70933979</text:p>
          </table:table-cell>
          <table:table-cell office:value-type="float" office:value="554592554" table:style-name="ce1">
            <text:p>5545925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9</text:p>
          </table:table-cell>
          <table:table-cell office:value-type="float" office:value="1000000" table:style-name="ce1">
            <text:p>1000000</text:p>
          </table:table-cell>
          <table:table-cell office:value-type="float" office:value="141554681" table:style-name="ce1">
            <text:p>141554681</text:p>
          </table:table-cell>
          <table:table-cell office:value-type="float" office:value="1057453598" table:style-name="ce1">
            <text:p>10574535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1</text:p>
          </table:table-cell>
          <table:table-cell office:value-type="float" office:value="10000" table:style-name="ce1">
            <text:p>10000</text:p>
          </table:table-cell>
          <table:table-cell office:value-type="float" office:value="1493757" table:style-name="ce1">
            <text:p>1493757</text:p>
          </table:table-cell>
          <table:table-cell office:value-type="float" office:value="18344107" table:style-name="ce1">
            <text:p>183441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1</text:p>
          </table:table-cell>
          <table:table-cell office:value-type="float" office:value="100000" table:style-name="ce1">
            <text:p>100000</text:p>
          </table:table-cell>
          <table:table-cell office:value-type="float" office:value="14770651" table:style-name="ce1">
            <text:p>14770651</text:p>
          </table:table-cell>
          <table:table-cell office:value-type="float" office:value="166327257" table:style-name="ce1">
            <text:p>1663272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1</text:p>
          </table:table-cell>
          <table:table-cell office:value-type="float" office:value="500000" table:style-name="ce1">
            <text:p>500000</text:p>
          </table:table-cell>
          <table:table-cell office:value-type="float" office:value="72956509" table:style-name="ce1">
            <text:p>72956509</text:p>
          </table:table-cell>
          <table:table-cell office:value-type="float" office:value="771637473" table:style-name="ce1">
            <text:p>7716374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1</text:p>
          </table:table-cell>
          <table:table-cell office:value-type="float" office:value="1000000" table:style-name="ce1">
            <text:p>1000000</text:p>
          </table:table-cell>
          <table:table-cell office:value-type="float" office:value="145435759" table:style-name="ce1">
            <text:p>145435759</text:p>
          </table:table-cell>
          <table:table-cell office:value-type="float" office:value="1491684703" table:style-name="ce1">
            <text:p>14916847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4</text:p>
          </table:table-cell>
          <table:table-cell office:value-type="float" office:value="10000" table:style-name="ce1">
            <text:p>10000</text:p>
          </table:table-cell>
          <table:table-cell office:value-type="float" office:value="1557487" table:style-name="ce1">
            <text:p>1557487</text:p>
          </table:table-cell>
          <table:table-cell office:value-type="float" office:value="24848031" table:style-name="ce1">
            <text:p>248480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4</text:p>
          </table:table-cell>
          <table:table-cell office:value-type="float" office:value="100000" table:style-name="ce1">
            <text:p>100000</text:p>
          </table:table-cell>
          <table:table-cell office:value-type="float" office:value="15349203" table:style-name="ce1">
            <text:p>15349203</text:p>
          </table:table-cell>
          <table:table-cell office:value-type="float" office:value="231482375" table:style-name="ce1">
            <text:p>2314823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4</text:p>
          </table:table-cell>
          <table:table-cell office:value-type="float" office:value="500000" table:style-name="ce1">
            <text:p>500000</text:p>
          </table:table-cell>
          <table:table-cell office:value-type="float" office:value="75954837" table:style-name="ce1">
            <text:p>75954837</text:p>
          </table:table-cell>
          <table:table-cell office:value-type="float" office:value="1097008358" table:style-name="ce1">
            <text:p>10970083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4</text:p>
          </table:table-cell>
          <table:table-cell office:value-type="float" office:value="1000000" table:style-name="ce1">
            <text:p>1000000</text:p>
          </table:table-cell>
          <table:table-cell office:value-type="float" office:value="151424007" table:style-name="ce1">
            <text:p>151424007</text:p>
          </table:table-cell>
          <table:table-cell office:value-type="float" office:value="2142700110" table:style-name="ce1">
            <text:p>21427001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8</text:p>
          </table:table-cell>
          <table:table-cell office:value-type="float" office:value="10000" table:style-name="ce1">
            <text:p>10000</text:p>
          </table:table-cell>
          <table:table-cell office:value-type="float" office:value="1636025" table:style-name="ce1">
            <text:p>1636025</text:p>
          </table:table-cell>
          <table:table-cell office:value-type="float" office:value="33526295" table:style-name="ce1">
            <text:p>335262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8</text:p>
          </table:table-cell>
          <table:table-cell office:value-type="float" office:value="100000" table:style-name="ce1">
            <text:p>100000</text:p>
          </table:table-cell>
          <table:table-cell office:value-type="float" office:value="16160659" table:style-name="ce1">
            <text:p>16160659</text:p>
          </table:table-cell>
          <table:table-cell office:value-type="float" office:value="318200349" table:style-name="ce1">
            <text:p>3182003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8</text:p>
          </table:table-cell>
          <table:table-cell office:value-type="float" office:value="500000" table:style-name="ce1">
            <text:p>500000</text:p>
          </table:table-cell>
          <table:table-cell office:value-type="float" office:value="79941643" table:style-name="ce1">
            <text:p>79941643</text:p>
          </table:table-cell>
          <table:table-cell office:value-type="float" office:value="1531175448" table:style-name="ce1">
            <text:p>15311754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8</text:p>
          </table:table-cell>
          <table:table-cell office:value-type="float" office:value="1000000" table:style-name="ce1">
            <text:p>1000000</text:p>
          </table:table-cell>
          <table:table-cell office:value-type="float" office:value="159461413" table:style-name="ce1">
            <text:p>159461413</text:p>
          </table:table-cell>
          <table:table-cell office:value-type="float" office:value="3010716385" table:style-name="ce1">
            <text:p>30107163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4</text:p>
          </table:table-cell>
          <table:table-cell office:value-type="float" office:value="10000" table:style-name="ce1">
            <text:p>10000</text:p>
          </table:table-cell>
          <table:table-cell office:value-type="float" office:value="1754809" table:style-name="ce1">
            <text:p>1754809</text:p>
          </table:table-cell>
          <table:table-cell office:value-type="float" office:value="46549767" table:style-name="ce1">
            <text:p>465497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4</text:p>
          </table:table-cell>
          <table:table-cell office:value-type="float" office:value="100000" table:style-name="ce1">
            <text:p>100000</text:p>
          </table:table-cell>
          <table:table-cell office:value-type="float" office:value="17334091" table:style-name="ce1">
            <text:p>17334091</text:p>
          </table:table-cell>
          <table:table-cell office:value-type="float" office:value="448429644" table:style-name="ce1">
            <text:p>4484296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4</text:p>
          </table:table-cell>
          <table:table-cell office:value-type="float" office:value="500000" table:style-name="ce1">
            <text:p>500000</text:p>
          </table:table-cell>
          <table:table-cell office:value-type="float" office:value="85903035" table:style-name="ce1">
            <text:p>85903035</text:p>
          </table:table-cell>
          <table:table-cell office:value-type="float" office:value="2182115339" table:style-name="ce1">
            <text:p>21821153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4</text:p>
          </table:table-cell>
          <table:table-cell office:value-type="float" office:value="1000000" table:style-name="ce1">
            <text:p>1000000</text:p>
          </table:table-cell>
          <table:table-cell office:value-type="float" office:value="171416615" table:style-name="ce1">
            <text:p>171416615</text:p>
          </table:table-cell>
          <table:table-cell office:value-type="float" office:value="4312673853" table:style-name="ce1">
            <text:p>43126738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8</text:p>
          </table:table-cell>
          <table:table-cell office:value-type="float" office:value="10000" table:style-name="ce1">
            <text:p>10000</text:p>
          </table:table-cell>
          <table:table-cell office:value-type="float" office:value="1836363" table:style-name="ce1">
            <text:p>1836363</text:p>
          </table:table-cell>
          <table:table-cell office:value-type="float" office:value="55258628" table:style-name="ce1">
            <text:p>552586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8</text:p>
          </table:table-cell>
          <table:table-cell office:value-type="float" office:value="100000" table:style-name="ce1">
            <text:p>100000</text:p>
          </table:table-cell>
          <table:table-cell office:value-type="float" office:value="18140287" table:style-name="ce1">
            <text:p>18140287</text:p>
          </table:table-cell>
          <table:table-cell office:value-type="float" office:value="535250910" table:style-name="ce1">
            <text:p>5352509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8</text:p>
          </table:table-cell>
          <table:table-cell office:value-type="float" office:value="500000" table:style-name="ce1">
            <text:p>500000</text:p>
          </table:table-cell>
          <table:table-cell office:value-type="float" office:value="89914167" table:style-name="ce1">
            <text:p>89914167</text:p>
          </table:table-cell>
          <table:table-cell office:value-type="float" office:value="2616179788" table:style-name="ce1">
            <text:p>26161797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8</text:p>
          </table:table-cell>
          <table:table-cell office:value-type="float" office:value="1000000" table:style-name="ce1">
            <text:p>1000000</text:p>
          </table:table-cell>
          <table:table-cell office:value-type="float" office:value="179461483" table:style-name="ce1">
            <text:p>179461483</text:p>
          </table:table-cell>
          <table:table-cell office:value-type="float" office:value="5180612225" table:style-name="ce1">
            <text:p>51806122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32</text:p>
          </table:table-cell>
          <table:table-cell office:value-type="float" office:value="10000" table:style-name="ce1">
            <text:p>10000</text:p>
          </table:table-cell>
          <table:table-cell office:value-type="float" office:value="1922269" table:style-name="ce1">
            <text:p>1922269</text:p>
          </table:table-cell>
          <table:table-cell office:value-type="float" office:value="63894577" table:style-name="ce1">
            <text:p>638945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32</text:p>
          </table:table-cell>
          <table:table-cell office:value-type="float" office:value="100000" table:style-name="ce1">
            <text:p>100000</text:p>
          </table:table-cell>
          <table:table-cell office:value-type="float" office:value="18957959" table:style-name="ce1">
            <text:p>18957959</text:p>
          </table:table-cell>
          <table:table-cell office:value-type="float" office:value="622079771" table:style-name="ce1">
            <text:p>6220797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32</text:p>
          </table:table-cell>
          <table:table-cell office:value-type="float" office:value="500000" table:style-name="ce1">
            <text:p>500000</text:p>
          </table:table-cell>
          <table:table-cell office:value-type="float" office:value="93915489" table:style-name="ce1">
            <text:p>93915489</text:p>
          </table:table-cell>
          <table:table-cell office:value-type="float" office:value="3050241199" table:style-name="ce1">
            <text:p>30502411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32</text:p>
          </table:table-cell>
          <table:table-cell office:value-type="float" office:value="1000000" table:style-name="ce1">
            <text:p>1000000</text:p>
          </table:table-cell>
          <table:table-cell office:value-type="float" office:value="187456247" table:style-name="ce1">
            <text:p>187456247</text:p>
          </table:table-cell>
          <table:table-cell office:value-type="float" office:value="6048897797" table:style-name="ce1">
            <text:p>6048897797</text:p>
          </table:table-cell>
          <table:table-cell table:number-columns-repeated="16380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nikolas pomiloridis</meta:initial-creator>
    <dc:creator>nikolas pomiloridis</dc:creator>
    <meta:creation-date>2025-12-04T18:45:13Z</meta:creation-date>
    <dc:date>2025-12-04T18:50:56Z</dc:date>
  </office:meta>
</office:document-meta>
</file>